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6000000DD000000DDB9E3AF7F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ic Relief" svg:font-family="'Comic Relief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7.7291in" svg:height="6.5047in" draw:transform="skewX (-0.00401425727958696) rotate (-0.00401425727958695) translate (5.09488188976378in 0.439370078740158in)">
            <draw:object draw:notify-on-update-of-ranges="Sheet1.A2:Sheet1.A7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exitas</text:p>
          </table:table-cell>
          <table:table-cell office:value-type="string" calcext:value-type="string">
            <text:p>energ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ic Relief" svg:font-family="'Comic Relief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0T14:10:11.954326944</meta:creation-date>
    <dc:date>2026-07-20T15:04:35.669759913</dc:date>
    <meta:editing-duration>PT16M16S</meta:editing-duration>
    <meta:editing-cycles>1</meta:editing-cycles>
    <meta:document-statistic meta:table-count="1" meta:cell-count="14" meta:object-count="1"/>
    <meta:generator>LibreOffice/26.2.4.2$Linux_X86_64 LibreOffice_project/6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draw:opacity="5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6000000DD000000DDB9E3AF7F.svm"/>
      </style:chart-properties>
    </style:style>
    <style:style style:name="ch4" style:family="chart" style:data-style-name="N0">
      <style:chart-properties chart:display-label="true" chart:logarithmic="false" chart:minimum="-10" chart:maximum="10" chart:reverse-direction="false" text:line-break="false" loext:try-staggering-first="false" chart:link-data-style-to-source="true" chart:axis-position="0"/>
      <style:graphic-properties draw:stroke-dash="Dot" svg:stroke-width="0.102cm" svg:stroke-color="#ffff00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draw:stroke-dash="Dot" svg:stroke-width="0.102cm" svg:stroke-color="#ffff00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-dash="Dot" svg:stroke-width="0.102cm" svg:stroke-color="#ffff00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amed-symbol" chart:symbol-name="star" chart:symbol-width="0.5cm" chart:symbol-height="0.5cm" chart:link-data-style-to-source="true"/>
      <style:graphic-properties draw:stroke="dash" draw:stroke-dash="Long_20_Dot_20__28_Rounded_29_" svg:stroke-width="0.08cm" svg:stroke-color="#0f7700" svg:stroke-linecap="round" draw:fill-color="#0f7700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tar" chart:symbol-width="0.5cm" chart:symbol-height="0.5cm"/>
    </style:style>
    <style:style style:name="ch11" style:family="chart">
      <style:graphic-properties draw:stroke="solid" svg:stroke-color="#b3b3b3" draw:fill="gradient" draw:fill-color="#e6e6e6" draw:fill-gradient-name="ChartGradient_20_1" draw:gradient-step-count="0" draw:opacity="50%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9.633cm" svg:height="16.523cm" xlink:href=".." xlink:type="simple" chart:class="chart:scatter" chart:style-name="ch1">
        <chart:title svg:x="7.907cm" svg:y="0.466cm" chart:style-name="ch2">
          <text:p>inexitas et energie</text:p>
        </chart:title>
        <chart:plot-area chart:style-name="ch3" svg:x="1.403cm" svg:y="1.575cm" svg:width="17.838cm" svg:height="13.637cm">
          <chart:coordinate-region svg:x="1.652cm" svg:y="1.774cm" svg:width="17.396cm" svg:height="12.791cm"/>
          <chart:axis chart:dimension="x" chart:name="primary-x" chart:style-name="ch4">
            <chart:title svg:x="8.531cm" svg:y="15.542cm" chart:style-name="ch2">
              <text:p><text:span text:style-name="T1">Type d'énergie (inexitas)</text:span></text:p>
            </chart:title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title svg:x="0.451cm" svg:y="9.654cm" chart:style-name="ch8">
              <text:p><text:span text:style-name="T1">Quatité d'énergie</text:span></text:p>
            </chart:title>
            <chart:grid chart:style-name="ch5" chart:class="major"/>
          </chart:axis>
          <chart:axis chart:dimension="y" chart:name="secondary-y" chart:style-name="ch6"/>
          <chart:series chart:attached-axis="primary-y" chart:style-name="ch9" chart:values-cell-range-address="Sheet1.A2:Sheet1.A7" chart:class="chart:scatter">
            <chart:domain table:cell-range-address="Sheet1.B2:Sheet1.B7"/>
            <chart:data-point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Sheet1.B2:Sheet1.B7</svg:desc>
                </draw:g>
              </table:table-cell>
              <table:table-cell office:value-type="float" office:value="2">
                <text:p>2</text:p>
                <draw:g>
                  <svg:desc>Sheet1.A2:Sheet1.A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gradient draw:name="ChartGradient_20_1" draw:display-name="ChartGradient 1" draw:style="linear" draw:start-color="#2a6099" draw:end-color="#ff0000" draw:start-intensity="100%" draw:end-intensity="100%" draw:angle="90deg" draw:border="0%">
      <loext:gradient-stop svg:offset="0" loext:color-type="rgb" loext:color-value="#2a6099"/>
      <loext:gradient-stop svg:offset="1" loext:color-type="rgb" loext:color-value="#ff0000"/>
    </draw:gradient>
    <draw:opacity draw:name="ChartTransparencyGradient_20_1" draw:display-name="ChartTransparencyGradient 1" draw:style="axial" draw:start="100%" draw:end="100%" draw:angle="0deg" draw:border="0%">
      <loext:opacity-stop svg:offset="1" svg:stop-opacity="1"/>
    </draw:opacity>
    <draw:stroke-dash draw:name="Dot" draw:style="rect" draw:dots1="1" draw:dots1-length="100%" draw:distance="100%"/>
    <draw:stroke-dash draw:name="Long_20_Dot_20__28_Rounded_29_" draw:display-name="Long Dot (Rounded)" draw:style="round" draw:dots1="1" draw:dots1-length="1%" draw:distance="399%"/>
  </office:styles>
</office:document-styles>
</file>